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left="0in" fo:margin-right="0in" fo:text-indent="0in" style:auto-text-indent="false"/>
    </style:style>
    <style:style style:name="P3" style:family="paragraph" style:parent-style-name="Text_20_body" style:list-style-name="L2">
      <style:paragraph-properties fo:margin-left="0in" fo:margin-right="0in" fo:text-indent="0in" style:auto-text-indent="false"/>
    </style:style>
    <style:style style:name="P4" style:family="paragraph" style:parent-style-name="Text_20_body" style:list-style-name="L3">
      <style:paragraph-properties fo:margin-left="0in" fo:margin-right="0in" fo:text-indent="0in" style:auto-text-indent="false"/>
    </style:style>
    <style:style style:name="P5" style:family="paragraph" style:parent-style-name="Text_20_body" style:list-style-name="L4">
      <style:paragraph-properties fo:margin-left="0in" fo:margin-right="0in" fo:text-indent="0in" style:auto-text-indent="false"/>
    </style:style>
    <style:style style:name="P6" style:family="paragraph" style:parent-style-name="Text_20_body" style:list-style-name="L5">
      <style:paragraph-properties fo:margin-left="0in" fo:margin-right="0in" fo:text-indent="0in" style:auto-text-indent="false"/>
    </style:style>
    <style:style style:name="P7" style:family="paragraph" style:parent-style-name="Text_20_body" style:list-style-name="L6">
      <style:paragraph-properties fo:margin-left="0in" fo:margin-right="0in" fo:text-indent="0in" style:auto-text-indent="false"/>
    </style:style>
    <style:style style:name="P8" style:family="paragraph" style:parent-style-name="Text_20_body" style:list-style-name="L7">
      <style:paragraph-properties fo:margin-left="0in" fo:margin-right="0in" fo:text-indent="0in" style:auto-text-indent="false"/>
    </style:style>
    <style:style style:name="P9" style:family="paragraph" style:parent-style-name="Text_20_body" style:list-style-name="L8">
      <style:paragraph-properties fo:margin-left="0in" fo:margin-right="0in" fo:text-indent="0in" style:auto-text-indent="false"/>
    </style:style>
    <style:style style:name="P10" style:family="paragraph" style:parent-style-name="Text_20_body" style:list-style-name="L9">
      <style:paragraph-properties fo:margin-left="0in" fo:margin-right="0in" fo:text-indent="0in" style:auto-text-indent="false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Heading_20_1">
      <style:paragraph-properties fo:margin-left="0in" fo:margin-right="0in" fo:margin-top="0in" fo:margin-bottom="0.0972in" style:contextual-spacing="false" fo:line-height="115%" fo:text-indent="0in" style:auto-text-indent="false"/>
    </style:style>
    <style:style style:name="P13" style:family="paragraph" style:parent-style-name="Heading_20_3">
      <style:paragraph-properties fo:margin-top="0in" fo:margin-bottom="0.0972in" style:contextual-spacing="false" fo:line-height="115%"/>
    </style:style>
    <style:style style:name="P14" style:family="paragraph" style:parent-style-name="Text_20_body" style:list-style-name="L10">
      <style:paragraph-properties fo:margin-left="0in" fo:margin-right="0in" fo:text-indent="0in" style:auto-text-indent="false"/>
    </style:style>
    <style:style style:name="P15" style:family="paragraph" style:parent-style-name="Text_20_body" style:list-style-name="L11">
      <style:paragraph-properties fo:margin-left="0in" fo:margin-right="0in" fo:text-indent="0in" style:auto-text-indent="false"/>
    </style:style>
    <style:style style:name="P16" style:family="paragraph" style:parent-style-name="Text_20_body" style:list-style-name="L12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Descrierea relațiilor și cardinalităților</text:span></text:h>
      <text:h text:style-name="Heading_20_3" text:outline-level="3"><text:span text:style-name="Strong_20_Emphasis">Submarine_Type – Route</text:span></text:h>
      <text:list text:style-name="L1">
        <text:list-item>
          <text:p text:style-name="P2">1 tip de submarin → poate opera mai multe rute</text:p>
        </text:list-item>
        <text:list-item>
          <text:p text:style-name="P2">1 rută → este operată de un singur tip <text:span text:style-name="Strong_20_Emphasis">Cardinalitate:</text:span> 1 : N</text:p>
        </text:list-item>
      </text:list>
      <text:h text:style-name="Heading_20_3" text:outline-level="3"><text:span text:style-name="Strong_20_Emphasis">Station – Route (origin)</text:span></text:h>
      <text:list text:style-name="L2">
        <text:list-item>
          <text:p text:style-name="P3">1 stație → poate fi origine pentru multe rute</text:p>
        </text:list-item>
        <text:list-item>
          <text:p text:style-name="P3">1 rută → are o singură stație de origine <text:span text:style-name="Strong_20_Emphasis">Cardinalitate:</text:span> 1 : N</text:p>
        </text:list-item>
      </text:list>
      <text:h text:style-name="Heading_20_3" text:outline-level="3"><text:span text:style-name="Strong_20_Emphasis">Station – Route (destination)</text:span></text:h>
      <text:list text:style-name="L3">
        <text:list-item>
          <text:p text:style-name="P4">identic cu origin <text:span text:style-name="Strong_20_Emphasis">Cardinalitate:</text:span> 1 : N</text:p>
        </text:list-item>
      </text:list>
      <text:h text:style-name="Heading_20_3" text:outline-level="3"><text:span text:style-name="Strong_20_Emphasis">Route – Scheduled_Dive</text:span></text:h>
      <text:list text:style-name="L4">
        <text:list-item>
          <text:p text:style-name="P5">1 rută → are multe scufundări programate</text:p>
        </text:list-item>
        <text:list-item>
          <text:p text:style-name="P5">1 scufundare → aparține unei singure rute <text:span text:style-name="Strong_20_Emphasis">Cardinalitate:</text:span> 1 : N</text:p>
        </text:list-item>
      </text:list>
      <text:h text:style-name="Heading_20_3" text:outline-level="3"><text:span text:style-name="Strong_20_Emphasis">Passenger – Itinerary</text:span></text:h>
      <text:list text:style-name="L5">
        <text:list-item>
          <text:p text:style-name="P6">1 pasager → poate avea mai multe itinerarii</text:p>
        </text:list-item>
        <text:list-item>
          <text:p text:style-name="P6">1 itinerariu → aparține unui singur pasager <text:span text:style-name="Strong_20_Emphasis">Cardinalitate:</text:span> 1 : N</text:p>
        </text:list-item>
      </text:list>
      <text:h text:style-name="Heading_20_3" text:outline-level="3"><text:span text:style-name="Strong_20_Emphasis">Itinerary – Itinerary_Segment</text:span></text:h>
      <text:list text:style-name="L6">
        <text:list-item>
          <text:p text:style-name="P7">1 itinerariu → are unul sau mai multe segmente</text:p>
        </text:list-item>
        <text:list-item>
          <text:p text:style-name="P7">1 segment → aparține unui singur itinerariu <text:span text:style-name="Strong_20_Emphasis">Cardinalitate:</text:span> 1 : N</text:p>
        </text:list-item>
      </text:list>
      <text:h text:style-name="Heading_20_3" text:outline-level="3"><text:span text:style-name="Strong_20_Emphasis">Scheduled_Dive – Itinerary_Segment</text:span></text:h>
      <text:list text:style-name="L7">
        <text:list-item>
          <text:p text:style-name="P8">1 scufundare → poate apărea în multe segmente</text:p>
        </text:list-item>
        <text:list-item>
          <text:p text:style-name="P8">1 segment → folosește o singură scufundare <text:span text:style-name="Strong_20_Emphasis">Cardinalitate:</text:span> 1 : N</text:p>
        </text:list-item>
      </text:list>
      <text:h text:style-name="Heading_20_3" text:outline-level="3"><text:span text:style-name="Strong_20_Emphasis">Crew_Member – Dive_Crew</text:span></text:h>
      <text:list text:style-name="L8">
        <text:list-item>
          <text:p text:style-name="P9">1 membru echipaj → poate participa la multe scufundări</text:p>
        </text:list-item>
        <text:list-item>
          <text:p text:style-name="P9">1 scufundare → are mai mulți membri în echipaj <text:span text:style-name="Strong_20_Emphasis">Cardinalitate:</text:span> M : N (implementată prin Dive_Crew)</text:p>
        </text:list-item>
      </text:list>
      <text:h text:style-name="Heading_20_3" text:outline-level="3"><text:soft-page-break/><text:span text:style-name="Strong_20_Emphasis">Crew_Member – Captain/Engineer/Medic</text:span></text:h>
      <text:list text:style-name="L9">
        <text:list-item>
          <text:p text:style-name="P10">1 membru → poate fi cel mult un tip de specialist</text:p>
        </text:list-item>
        <text:list-item>
          <text:p text:style-name="P10">1 specialist → este exact un membru <text:span text:style-name="Strong_20_Emphasis">Cardinalitate:</text:span> 1 : 1 (parțială)</text:p>
        </text:list-item>
      </text:list>
      <text:p text:style-name="P11"/>
      <text:h text:style-name="P12" text:outline-level="1"><text:span text:style-name="Strong_20_Emphasis"><text:span text:style-name="T1">Relația ternară adăugată: Passenger – Crew_Member – Scheduled_Dive (Internship)</text:span></text:span></text:h>
      <text:h text:style-name="P13" text:outline-level="3"><text:span text:style-name="Strong_20_Emphasis">Passenger – Internship</text:span></text:h>
      <text:list text:style-name="L10">
        <text:list-item>
          <text:p text:style-name="P14">1 pasager → poate participa la mai multe internship-uri</text:p>
        </text:list-item>
        <text:list-item>
          <text:p text:style-name="P14">1 internship → implică un singur pasager <text:span text:style-name="Strong_20_Emphasis">Cardinalitate: 1 : N</text:span></text:p>
        </text:list-item>
      </text:list>
      <text:h text:style-name="P13" text:outline-level="3"><text:span text:style-name="Strong_20_Emphasis">Crew_Member – Internship</text:span></text:h>
      <text:list text:style-name="L11">
        <text:list-item>
          <text:p text:style-name="P15">1 membru al echipajului → poate instrui mai mulți pasageri</text:p>
        </text:list-item>
        <text:list-item>
          <text:p text:style-name="P15">1 internship → are un singur instructor <text:span text:style-name="Strong_20_Emphasis">Cardinalitate: 1 : N</text:span></text:p>
        </text:list-item>
      </text:list>
      <text:h text:style-name="P13" text:outline-level="3"><text:span text:style-name="Strong_20_Emphasis">Scheduled_Dive – Internship</text:span></text:h>
      <text:list text:style-name="L12">
        <text:list-item>
          <text:p text:style-name="P16">1 scufundare → poate include zero, unul sau mai multe internship-uri</text:p>
        </text:list-item>
        <text:list-item>
          <text:p text:style-name="P16">1 internship → are loc într-o singură scufundare <text:span text:style-name="Strong_20_Emphasis">Cardinalitate: 1 : N</text:span></text:p>
        </text:list-item>
      </text:list>
      <text:h text:style-name="P13" text:outline-level="3"><text:span text:style-name="Strong_20_Emphasis">Tipul relației</text:span></text:h>
      <text:p text:style-name="P11">Relație <text:span text:style-name="Strong_20_Emphasis">ternară</text:span> între Passenger, Crew_Member și Scheduled_Dive, reprezentată logic printr-un tabel asociativ cu cheia primară compusă:</text:p>
      <text:p text:style-name="P17">(passenger_id, crew_id, dive_id)</text:p>
      <text:p text:style-name="P1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17T16:18:19.532896500</dc:date>
    <meta:editing-duration>PT4M31S</meta:editing-duration>
    <meta:editing-cycles>3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40" meta:word-count="321" meta:character-count="1950" meta:non-whitespace-character-count="1678"/>
  </office:meta>
</office:document-meta>
</file>