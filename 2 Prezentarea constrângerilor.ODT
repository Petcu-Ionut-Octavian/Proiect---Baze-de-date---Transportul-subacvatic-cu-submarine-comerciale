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.0972in" style:contextual-spacing="false" fo:line-height="115%" fo:text-align="justify" style:justify-single-word="false"/>
    </style:style>
    <style:style style:name="P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Text_20_body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ezentarea constrângerilor (restricții, reguli) impuse asupra modelului </text:span></text:h>
      <text:h text:style-name="P2" text:outline-level="2"><text:span text:style-name="Strong_20_Emphasis">Integritate structurală</text:span></text:h>
      <text:list text:style-name="L1">
        <text:list-item>
          <text:p text:style-name="P3">Fiecare entitate are o cheie primară unică.</text:p>
        </text:list-item>
        <text:list-item>
          <text:p text:style-name="P3">Cheile străine trebuie să existe în tabelele referențiate.</text:p>
        </text:list-item>
        <text:list-item>
          <text:p text:style-name="P3">Relațiile 1–1 dintre Crew_Member și subclase sunt obligatorii doar pentru membrii care apar în roluri specializate.</text:p>
        </text:list-item>
        <text:list-item>
          <text:p text:style-name="P3"><text:span text:style-name="Strong_20_Emphasis">Relația ternară Internship are o cheie primară compusă din (passenger_id, crew_id, dive_id).</text:span></text:p>
        </text:list-item>
        <text:list-item>
          <text:p text:style-name="P3"><text:span text:style-name="Strong_20_Emphasis">Fiecare înregistrare din Internship trebuie să facă referință simultan la un Passenger, un Crew_Member și un Scheduled_Dive existente.</text:span></text:p>
        </text:list-item>
      </text:list>
      <text:h text:style-name="P2" text:outline-level="2"><text:span text:style-name="Strong_20_Emphasis">Integritate semantică</text:span></text:h>
      <text:list text:style-name="L2">
        <text:list-item>
          <text:p text:style-name="P4">origin_station_id ≠ destination_station_id pentru o rută.</text:p>
        </text:list-item>
        <text:list-item>
          <text:p text:style-name="P4">available_seats ≤ capacity pentru scufundări.</text:p>
        </text:list-item>
        <text:list-item>
          <text:p text:style-name="P4">arrival_time &gt; departure_time pentru Scheduled_Dive.</text:p>
        </text:list-item>
        <text:list-item>
          <text:p text:style-name="P4">segment_order trebuie să fie pozitiv și unic în cadrul aceluiași itinerariu.</text:p>
        </text:list-item>
        <text:list-item>
          <text:p text:style-name="P4">medical_clearance trebuie să aibă valori valide (ex.: “OK”, “LIMITED”, “DENIED”).</text:p>
        </text:list-item>
        <text:list-item>
          <text:p text:style-name="P4">Un membru al echipajului nu poate avea simultan două roluri diferite (Captain/Engineer/Medic).</text:p>
        </text:list-item>
        <text:list-item>
          <text:p text:style-name="P4"><text:span text:style-name="Strong_20_Emphasis">Un pasager nu poate avea două internship-uri cu același membru al echipajului în aceeași scufundare.</text:span></text:p>
        </text:list-item>
        <text:list-item>
          <text:p text:style-name="P4"><text:span text:style-name="Strong_20_Emphasis">Un membru al echipajului poate instrui mai mulți pasageri, dar fiecare combinație (crew_id, passenger_id, dive_id) trebuie să fie unică.</text:span></text:p>
        </text:list-item>
        <text:list-item>
          <text:p text:style-name="P4"><text:span text:style-name="Strong_20_Emphasis">Un internship poate exista doar dacă scufundarea este programată.</text:span></text:p>
        </text:list-item>
        <text:list-item>
          <text:p text:style-name="P4"><text:span text:style-name="Strong_20_Emphasis">Nivelul de instruire (training_level) și feedback-ul trebuie să respecte intervalele definite (feedback ∈ [1,10]).</text:span></text:p>
        </text:list-item>
      </text:list>
      <text:h text:style-name="P2" text:outline-level="2"><text:span text:style-name="Strong_20_Emphasis">Integritate de domeniu</text:span></text:h>
      <text:list text:style-name="L3">
        <text:list-item>
          <text:p text:style-name="P5">Atributele numerice trebuie să fie pozitive.</text:p>
        </text:list-item>
        <text:list-item>
          <text:p text:style-name="P5">Adresele de email trebuie să respecte formatul standard.</text:p>
        </text:list-item>
        <text:list-item>
          <text:p text:style-name="P5"><text:soft-page-break/>Nivelurile de certificare și specializare trebuie să fie non-nule pentru subclase.</text:p>
        </text:list-item>
        <text:list-item>
          <text:p text:style-name="P5"><text:span text:style-name="Strong_20_Emphasis">training_level trebuie să fie un șir valid (“Beginner”, “Intermediate”, “Advanced”).</text:span></text:p>
        </text:list-item>
        <text:list-item>
          <text:p text:style-name="P5"><text:span text:style-name="Strong_20_Emphasis">feedback trebuie să fie un număr întreg într-un interval prestabilit.</text:span>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17T16:08:58.018798800</dc:date>
    <meta:editing-duration>PT3M28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4" meta:word-count="247" meta:character-count="1756" meta:non-whitespace-character-count="1553"/>
  </office:meta>
</office:document-meta>
</file>