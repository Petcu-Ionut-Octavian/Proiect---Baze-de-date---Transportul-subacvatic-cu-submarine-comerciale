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</style:style>
    <style:style style:name="P4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/>
    </style:style>
    <style:style style:name="P5" style:family="paragraph" style:parent-style-name="Text_20_body" style:list-style-name="L3">
      <style:paragraph-properties fo:margin-left="0in" fo:margin-right="0in" fo:text-align="justify" style:justify-single-word="false" fo:text-indent="0in" style:auto-text-indent="false"/>
    </style:style>
    <style:style style:name="P6" style:family="paragraph" style:parent-style-name="Text_20_body">
      <style:paragraph-properties fo:text-align="justify" style:justify-single-word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Descrierea modelului real, a utilității acestuia și a regulilor de funcționare</text:span></text:h>
      <text:p text:style-name="P2">Modelul descrie un sistem de gestionare a transportului subacvatic cu submarine comerciale, utilizat pentru planificarea rutelor, programarea scufundărilor, rezervarea locurilor pentru pasageri și gestionarea echipajelor specializate. Pe lângă funcționalitățile de bază, sistemul include și un mecanism de <text:span text:style-name="Strong_20_Emphasis">internship</text:span> prin care pasagerii pot participa la sesiuni de instruire alături de membri ai echipajului în timpul scufundărilor programate.</text:p>
      <text:p text:style-name="P2">Sistemul permite:</text:p>
      <text:list text:style-name="L1">
        <text:list-item>
          <text:p text:style-name="P3">definirea tipurilor de submarine și a caracteristicilor tehnice (capacitate, adâncime maximă);</text:p>
        </text:list-item>
        <text:list-item>
          <text:p text:style-name="P3">administrarea stațiilor subacvatice și a rutelor dintre acestea;</text:p>
        </text:list-item>
        <text:list-item>
          <text:p text:style-name="P3">programarea scufundărilor (Scheduled_Dive) pe rute prestabilite;</text:p>
        </text:list-item>
        <text:list-item>
          <text:p text:style-name="P3">rezervarea călătoriilor de către pasageri prin itinerarii compuse din unul sau mai multe segmente;</text:p>
        </text:list-item>
        <text:list-item>
          <text:p text:style-name="P3">alocarea echipajelor specializate (căpitani, ingineri, medici) pentru fiecare scufundare;</text:p>
        </text:list-item>
        <text:list-item>
          <text:p text:style-name="P3"><text:span text:style-name="Strong_20_Emphasis">organizarea programelor de internship</text:span>, în care un pasager poate fi instruit de un membru al echipajului în cadrul unei scufundări specifice.</text:p>
        </text:list-item>
      </text:list>
      <text:p text:style-name="P2">Utilitatea sistemului constă în:</text:p>
      <text:list text:style-name="L2">
        <text:list-item>
          <text:p text:style-name="P4">organizarea eficientă a transportului subacvatic;</text:p>
        </text:list-item>
        <text:list-item>
          <text:p text:style-name="P4">asigurarea siguranței prin verificarea echipajelor și a clearance-ului medical al pasagerilor;</text:p>
        </text:list-item>
        <text:list-item>
          <text:p text:style-name="P4">optimizarea rutelor și a programelor de scufundare;</text:p>
        </text:list-item>
        <text:list-item>
          <text:p text:style-name="P4">gestionarea rezervărilor și a fluxului de pasageri;</text:p>
        </text:list-item>
        <text:list-item>
          <text:p text:style-name="P4"><text:span text:style-name="Strong_20_Emphasis">creșterea valorii experienței turistice prin oferirea de instruire personalizată în timpul scufundărilor</text:span>;</text:p>
        </text:list-item>
        <text:list-item>
          <text:p text:style-name="P4">monitorizarea performanței și progresului pasagerilor care participă la programe de internship.</text:p>
        </text:list-item>
      </text:list>
      <text:p text:style-name="P2">Reguli de funcționare:</text:p>
      <text:list text:style-name="L3">
        <text:list-item>
          <text:p text:style-name="P5">Fiecare rută este operată de un anumit tip de submarin.</text:p>
        </text:list-item>
        <text:list-item>
          <text:p text:style-name="P5">O scufundare programată aparține unei singure rute.</text:p>
        </text:list-item>
        <text:list-item>
          <text:p text:style-name="P5">Un itinerariu poate conține unul sau mai multe segmente, ordonate.</text:p>
        </text:list-item>
        <text:list-item>
          <text:p text:style-name="P5">Un pasager poate avea mai multe itinerarii, dar fiecare itinerariu aparține unui singur pasager.</text:p>
        </text:list-item>
        <text:list-item>
          <text:p text:style-name="P5">Fiecare scufundare are un echipaj format din membri cu roluri diferite.</text:p>
        </text:list-item>
        <text:list-item>
          <text:p text:style-name="P5">Fiecare membru al echipajului poate participa la mai multe scufundări.</text:p>
        </text:list-item>
        <text:list-item>
          <text:p text:style-name="P5"><text:soft-page-break/>Un membru al echipajului poate fi doar un singur tip de specialist (căpitan, inginer sau medic).</text:p>
        </text:list-item>
        <text:list-item>
          <text:p text:style-name="P5"><text:span text:style-name="Strong_20_Emphasis">Un internship este definit simultan de trei entități: pasager, membru al echipajului și scufundare programată.</text:span></text:p>
        </text:list-item>
        <text:list-item>
          <text:p text:style-name="P5"><text:span text:style-name="Strong_20_Emphasis">Un pasager poate participa la mai multe internship-uri, dar fiecare internship este asociat unei singure scufundări și unui singur instructor.</text:span></text:p>
        </text:list-item>
        <text:list-item>
          <text:p text:style-name="P5"><text:span text:style-name="Strong_20_Emphasis">Un membru al echipajului poate instrui mai mulți pasageri în cadrul aceleiași scufundări sau în scufundări diferite.</text:span></text:p>
        </text:list-item>
        <text:list-item>
          <text:p text:style-name="P5"><text:span text:style-name="Strong_20_Emphasis">O scufundare poate include zero, unul sau mai multe internship-uri.</text:span></text:p>
        </text:list-item>
      </text:list>
      <text:p text:style-name="P6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17T16:05:44.292612600</dc:date>
    <meta:editing-duration>PT2M42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28" meta:word-count="361" meta:character-count="2549" meta:non-whitespace-character-count="2239"/>
  </office:meta>
</office:document-meta>
</file>