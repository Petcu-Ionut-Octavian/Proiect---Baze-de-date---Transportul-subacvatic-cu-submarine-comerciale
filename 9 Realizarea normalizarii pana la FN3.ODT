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align="center" style:justify-single-word="false" fo:text-indent="0in" style:auto-text-indent="false"/>
      <style:text-properties fo:font-size="22pt" fo:font-weight="bold" officeooo:rsid="00169910" officeooo:paragraph-rsid="00169910" style:font-size-asian="22pt" style:font-weight-asian="bold" style:font-size-complex="22pt" style:font-weight-complex="bold"/>
    </style:style>
    <style:style style:name="P2" style:family="paragraph" style:parent-style-name="Text_20_body">
      <style:paragraph-properties fo:margin-left="0in" fo:margin-right="0in" fo:text-indent="0in" style:auto-text-indent="false"/>
    </style:style>
    <style:style style:name="P3" style:family="paragraph" style:parent-style-name="Heading_20_1">
      <style:paragraph-properties fo:margin-left="0in" fo:margin-right="0in" fo:margin-top="0in" fo:margin-bottom="0.0972in" style:contextual-spacing="false" fo:line-height="115%" fo:text-indent="0in" style:auto-text-indent="false"/>
      <style:text-properties fo:font-size="12pt" style:font-size-asian="12pt" style:font-size-complex="12pt"/>
    </style:style>
    <style:style style:name="P4" style:family="paragraph" style:parent-style-name="Heading_20_2">
      <style:paragraph-properties fo:margin-top="0in" fo:margin-bottom="0.0972in" style:contextual-spacing="false" fo:line-height="115%"/>
      <style:text-properties fo:font-size="12pt" style:font-size-asian="12pt" style:font-size-complex="12pt"/>
    </style:style>
    <style:style style:name="P5" style:family="paragraph" style:parent-style-name="Text_20_body">
      <style:paragraph-properties fo:margin-left="0in" fo:margin-right="0in" fo:text-indent="0in" style:auto-text-indent="false"/>
      <style:text-properties style:font-size-asian="12pt"/>
    </style:style>
    <style:style style:name="P6" style:family="paragraph" style:parent-style-name="Heading_20_3">
      <style:paragraph-properties fo:margin-top="0in" fo:margin-bottom="0.0972in" style:contextual-spacing="false" fo:line-height="115%"/>
      <style:text-properties fo:font-size="12pt" style:font-size-asian="12pt" style:font-size-complex="12pt"/>
    </style:style>
    <style:style style:name="P7" style:family="paragraph" style:parent-style-name="Text_20_body" style:list-style-name="L1">
      <style:paragraph-properties fo:margin-left="0in" fo:margin-right="0in" fo:text-indent="0in" style:auto-text-indent="false"/>
      <style:text-properties style:font-size-asian="12pt"/>
    </style:style>
    <style:style style:name="P8" style:family="paragraph" style:parent-style-name="Text_20_body">
      <style:paragraph-properties fo:margin-left="0in" fo:margin-right="0in" fo:text-indent="0in" style:auto-text-indent="false"/>
      <style:text-properties fo:font-size="11pt" style:font-size-asian="11pt" style:font-size-complex="11pt"/>
    </style:style>
    <style:style style:name="P9" style:family="paragraph" style:parent-style-name="Text_20_body" style:list-style-name="L2">
      <style:paragraph-properties fo:margin-left="0in" fo:margin-right="0in" fo:text-indent="0in" style:auto-text-indent="false"/>
      <style:text-properties style:font-size-asian="12pt"/>
    </style:style>
    <style:style style:name="P10" style:family="paragraph" style:parent-style-name="Heading_20_1">
      <style:paragraph-properties fo:margin-top="0in" fo:margin-bottom="0.0972in" style:contextual-spacing="false" fo:line-height="115%"/>
      <style:text-properties fo:font-size="12pt" style:font-size-asian="12pt" style:font-size-complex="12pt"/>
    </style:style>
    <style:style style:name="P11" style:family="paragraph" style:parent-style-name="Text_20_body" style:list-style-name="L3">
      <style:paragraph-properties fo:margin-left="0in" fo:margin-right="0in" fo:text-indent="0in" style:auto-text-indent="false"/>
      <style:text-properties fo:font-size="11pt" style:font-size-asian="11pt" style:font-size-complex="11pt"/>
    </style:style>
    <style:style style:name="P12" style:family="paragraph" style:parent-style-name="Text_20_body">
      <style:paragraph-properties fo:margin-left="0in" fo:margin-right="0in" fo:text-indent="0in" style:auto-text-indent="false"/>
      <style:text-properties officeooo:paragraph-rsid="00174481" style:font-size-asian="12pt"/>
    </style:style>
    <style:style style:name="P13" style:family="paragraph" style:parent-style-name="Text_20_body">
      <style:paragraph-properties fo:margin-left="0in" fo:margin-right="0in" fo:margin-top="0in" fo:margin-bottom="0.0972in" style:contextual-spacing="false" fo:line-height="115%" fo:text-indent="0in" style:auto-text-indent="false"/>
      <style:text-properties fo:font-size="12pt" style:font-size-asian="12pt" style:font-size-complex="12pt"/>
    </style:style>
    <style:style style:name="P14" style:family="paragraph" style:parent-style-name="Text_20_body" style:list-style-name="L4">
      <style:paragraph-properties fo:margin-left="0in" fo:margin-right="0in" fo:text-indent="0in" style:auto-text-indent="false"/>
      <style:text-properties fo:font-size="11pt" style:font-size-asian="11pt" style:font-size-complex="11pt"/>
    </style:style>
    <style:style style:name="P15" style:family="paragraph" style:parent-style-name="Text_20_body" style:list-style-name="L5">
      <style:paragraph-properties fo:margin-left="0in" fo:margin-right="0in" fo:text-indent="0in" style:auto-text-indent="false"/>
    </style:style>
    <style:style style:name="P16" style:family="paragraph" style:parent-style-name="Text_20_body" style:list-style-name="L6">
      <style:paragraph-properties fo:margin-left="0in" fo:margin-right="0in" fo:text-indent="0in" style:auto-text-indent="false"/>
      <style:text-properties fo:font-size="11pt" style:font-size-asian="11pt" style:font-size-complex="11pt"/>
    </style:style>
    <style:style style:name="P17" style:family="paragraph" style:parent-style-name="Text_20_body" style:list-style-name="L7">
      <style:paragraph-properties fo:margin-left="0in" fo:margin-right="0in" fo:text-indent="0in" style:auto-text-indent="false"/>
      <style:text-properties fo:font-size="11pt" style:font-size-asian="11pt" style:font-size-complex="11pt"/>
    </style:style>
    <style:style style:name="P18" style:family="paragraph" style:parent-style-name="Text_20_body" style:list-style-name="L8">
      <style:paragraph-properties fo:margin-left="0in" fo:margin-right="0in" fo:text-indent="0in" style:auto-text-indent="false"/>
      <style:text-properties fo:font-size="11pt" style:font-size-asian="11pt" style:font-size-complex="11pt"/>
    </style:style>
    <style:style style:name="P19" style:family="paragraph" style:parent-style-name="Text_20_body" style:list-style-name="L9">
      <style:paragraph-properties fo:margin-left="0in" fo:margin-right="0in" fo:text-indent="0in" style:auto-text-indent="false"/>
      <style:text-properties fo:font-size="11pt" style:font-size-asian="11pt" style:font-size-complex="11pt"/>
    </style:style>
    <style:style style:name="P20" style:family="paragraph" style:parent-style-name="Standard">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size="12pt" style:font-size-asian="12pt" style:font-size-complex="12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rmalizare</text:p>
      <text:p text:style-name="P2"/>
      <text:h text:style-name="P3" text:outline-level="1"><text:span text:style-name="Strong_20_Emphasis"><text:span text:style-name="T1">A. PASSENGER_BAD – exemplu NON‑FN1 → FN1 → FN2 → FN3</text:span></text:span></text:h>
      <text:h text:style-name="P4" text:outline-level="2"><text:span text:style-name="Strong_20_Emphasis"><text:span text:style-name="T1">Relația inițială (NON‑FN1)</text:span></text:span></text:h>
      <text:p text:style-name="P5"><text:span text:style-name="Strong_20_Emphasis"><text:span text:style-name="T1">PASSENGER_BAD(passenger_id, full_name, medical_clearance)</text:span></text:span></text:p>
      <text:h text:style-name="P6" text:outline-level="3"><text:span text:style-name="Strong_20_Emphasis"><text:span text:style-name="T1">De ce NU este în FN1?</text:span></text:span></text:h>
      <text:list text:style-name="L1">
        <text:list-item>
          <text:p text:style-name="P7"><text:span text:style-name="Strong_20_Emphasis"><text:span text:style-name="T1">full_name</text:span></text:span><text:span text:style-name="T1"> este un atribut </text:span><text:span text:style-name="Strong_20_Emphasis"><text:span text:style-name="T1">neatomic</text:span></text:span><text:span text:style-name="T1"> (conține două valori: prenume + nume). FN1 cere ca toate atributele să fie </text:span><text:span text:style-name="Strong_20_Emphasis"><text:span text:style-name="T1">atomice</text:span></text:span><text:span text:style-name="T1">.</text:span></text:p>
        </text:list-item>
      </text:list>
      <text:p text:style-name="P5"><text:span text:style-name="T1">→ Relația </text:span><text:span text:style-name="Strong_20_Emphasis"><text:span text:style-name="T1">nu este în FN1</text:span></text:span><text:span text:style-name="T1">.</text:span></text:p>
      <text:h text:style-name="P4" text:outline-level="2"><text:span text:style-name="Strong_20_Emphasis"><text:span text:style-name="T1">Aducerea în FN1</text:span></text:span></text:h>
      <text:p text:style-name="P8">Descompunem atributul compus:</text:p>
      <text:p text:style-name="P5"><text:span text:style-name="Strong_20_Emphasis"><text:span text:style-name="T1">PASSENGER(passenger_id, first_name, last_name, medical_clearance)</text:span></text:span><text:span text:style-name="T1"> — FN1</text:span></text:p>
      <text:p text:style-name="P8">Toate atributele sunt acum atomice.</text:p>
      <text:h text:style-name="P4" text:outline-level="2"><text:span text:style-name="Strong_20_Emphasis"><text:span text:style-name="T1">Dependențe funcționale</text:span></text:span></text:h>
      <text:p text:style-name="P8">F = { passenger_id → (first_name, last_name, medical_clearance) }</text:p>
      <text:list text:style-name="L2">
        <text:list-item>
          <text:p text:style-name="P9"><text:span text:style-name="T1">cheia candidat: </text:span><text:span text:style-name="Strong_20_Emphasis"><text:span text:style-name="T1">passenger_id</text:span></text:span></text:p>
        </text:list-item>
      </text:list>
      <text:h text:style-name="P6" text:outline-level="3"><text:span text:style-name="Strong_20_Emphasis"><text:span text:style-name="T1">Este în FN2?</text:span></text:span></text:h>
      <text:p text:style-name="P5"><text:span text:style-name="T1">Da. Toate atributele nenucleu depind de cheia întreagă → </text:span><text:span text:style-name="Strong_20_Emphasis"><text:span text:style-name="T1">FN2</text:span></text:span><text:span text:style-name="T1">.</text:span></text:p>
      <text:h text:style-name="P6" text:outline-level="3"><text:span text:style-name="Strong_20_Emphasis"><text:span text:style-name="T1">Este în FN3?</text:span></text:span></text:h>
      <text:p text:style-name="P8">Da. Nu există dependențe tranzitive (nu avem ceva de forma passenger_id → X → Y).</text:p>
      <text:p text:style-name="P5"><text:span text:style-name="T1">→ </text:span><text:span text:style-name="Strong_20_Emphasis"><text:span text:style-name="T1">PASSENGER este în FN3</text:span></text:span><text:span text:style-name="T1">.</text:span></text:p>
      <text:h text:style-name="P10" text:outline-level="1"><text:span text:style-name="Strong_20_Emphasis"><text:span text:style-name="T1">B. ITINERARY_BAD – exemplu NON‑FN2 → FN2 → FN3</text:span></text:span></text:h>
      <text:h text:style-name="P4" text:outline-level="2"><text:span text:style-name="Strong_20_Emphasis"><text:span text:style-name="T1">Relația inițială (NON‑FN2)</text:span></text:span></text:h>
      <text:p text:style-name="P5"><text:span text:style-name="Strong_20_Emphasis"><text:span text:style-name="T1">ITINERARY_BAD(itinerary_id, passenger_id, created_at, total_price, passenger_first_name, passenger_last_name, medical_clearance)</text:span></text:span></text:p>
      <text:h text:style-name="P6" text:outline-level="3"><text:span text:style-name="Strong_20_Emphasis"><text:span text:style-name="T1">Este în FN1?</text:span></text:span></text:h>
      <text:p text:style-name="P8">Da. Toate atributele sunt atomice.</text:p>
      <text:h text:style-name="P4" text:outline-level="2"><text:span text:style-name="Strong_20_Emphasis"><text:span text:style-name="T1">Dependențe funcționale</text:span></text:span></text:h>
      <text:p text:style-name="P8">F = { itinerary_id → (passenger_id, created_at, total_price) passenger_id → (passenger_first_name, passenger_last_name, medical_clearance) }</text:p>
      <text:p text:style-name="P5"><text:span text:style-name="T1">Cheia candidat: </text:span><text:span text:style-name="Strong_20_Emphasis"><text:span text:style-name="T1">itinerary_id</text:span></text:span></text:p>
      <text:h text:style-name="P4" text:outline-level="2"><text:soft-page-break/><text:span text:style-name="Strong_20_Emphasis"><text:span text:style-name="T1">De ce NU este în FN2?</text:span></text:span></text:h>
      <text:p text:style-name="P5"><text:span text:style-name="T1">FN2 cere ca </text:span><text:span text:style-name="Strong_20_Emphasis"><text:span text:style-name="T1">atributele nenucleu să depindă direct de cheia întreagă</text:span></text:span><text:span text:style-name="T1">.</text:span></text:p>
      <text:p text:style-name="P8">Dar aici avem:</text:p>
      <text:list text:style-name="L3">
        <text:list-item>
          <text:p text:style-name="P11">itinerary_id → passenger_id</text:p>
        </text:list-item>
        <text:list-item>
          <text:p text:style-name="P11">passenger_id → (passenger_first_name, passenger_last_name, medical_clearance)</text:p>
        </text:list-item>
      </text:list>
      <text:p text:style-name="P5"><text:span text:style-name="T1">Atributele legate de pasager </text:span><text:span text:style-name="Strong_20_Emphasis"><text:span text:style-name="T1">nu depind direct de itinerary_id</text:span></text:span><text:span text:style-name="T1">, ci de passenger_id.</text:span></text:p>
      <text:p text:style-name="P5"><text:span text:style-name="T1">→ </text:span><text:span text:style-name="Strong_20_Emphasis"><text:span text:style-name="T1">Încălcare FN2</text:span></text:span><text:span text:style-name="T1"> (și FN3).</text:span></text:p>
      <text:h text:style-name="P4" text:outline-level="2"><text:span text:style-name="Strong_20_Emphasis"><text:span text:style-name="T1">Descompunere în FN2</text:span></text:span></text:h>
      <text:p text:style-name="P8">Separăm atributele pasagerului:</text:p>
      <text:p text:style-name="P5"><text:span text:style-name="Strong_20_Emphasis"><text:span text:style-name="T1">PASSENGER(passenger_id, first_name, last_name, email, medical_clearance)</text:span></text:span><text:span text:style-name="T1"> — FN3 (tabel existent) </text:span><text:span text:style-name="Strong_20_Emphasis"><text:span text:style-name="T1">ITINERARY(itinerary_id, passenger_id, created_at, total_price)</text:span></text:span><text:span text:style-name="T1"> — FN2</text:span></text:p>
      <text:h text:style-name="P4" text:outline-level="2"><text:span text:style-name="Strong_20_Emphasis"><text:span text:style-name="T1">Este ITINERARY în FN3?</text:span></text:span></text:h>
      <text:p text:style-name="P8">Da. Nu există dependențe tranzitive în ITINERARY.</text:p>
      <text:p text:style-name="P5"><text:span text:style-name="T1">→ </text:span><text:span text:style-name="Strong_20_Emphasis"><text:span text:style-name="T1">ITINERARY este în FN3</text:span></text:span><text:span text:style-name="T1">.</text:span></text:p>
      <text:h text:style-name="P10" text:outline-level="1"><text:span text:style-name="Strong_20_Emphasis"><text:span text:style-name="T1">C. SCHEDULED_DIVE_BAD – exemplu NON‑FN3 → FN3</text:span></text:span></text:h>
      <text:h text:style-name="P4" text:outline-level="2"><text:span text:style-name="Strong_20_Emphasis"><text:span text:style-name="T1">Relația inițială (NON‑FN3)</text:span></text:span></text:h>
      <text:p text:style-name="P5"><text:span text:style-name="Strong_20_Emphasis"><text:span text:style-name="T1">SCHEDULED_DIVE_BAD(dive_id, route_id, departure_time, arrival_time, available_seats, pressure_level, distance_km, base_price)</text:span></text:span></text:p>
      <text:p text:style-name="P5"><text:span text:style-name="T1">(distance_km, base_price) sunt atribute ale lui </text:span><text:span text:style-name="Strong_20_Emphasis"><text:span text:style-name="T1">Route</text:span></text:span><text:span text:style-name="T1">, copiate redundant.</text:span></text:p>
      <text:h text:style-name="P4" text:outline-level="2"><text:span text:style-name="Strong_20_Emphasis"><text:span text:style-name="T1">Este în FN1?</text:span></text:span></text:h>
      <text:p text:style-name="P8">Da. Toate atributele sunt atomice.</text:p>
      <text:h text:style-name="P4" text:outline-level="2"><text:span text:style-name="Strong_20_Emphasis"><text:span text:style-name="T1">Dependențe funcționale</text:span></text:span></text:h>
      <text:p text:style-name="P8">F = { dive_id → (route_id, departure_time, arrival_time, available_seats, pressure_level) route_id → (distance_km, base_price) }</text:p>
      <text:p text:style-name="P5"><text:span text:style-name="T1">Cheia candidat: </text:span><text:span text:style-name="Strong_20_Emphasis"><text:span text:style-name="T1">dive_id</text:span></text:span></text:p>
      <text:h text:style-name="P4" text:outline-level="2"><text:span text:style-name="Strong_20_Emphasis"><text:span text:style-name="T1">Este în FN2?</text:span></text:span></text:h>
      <text:p text:style-name="P8">Da. Nu există dependențe parțiale (cheia nu e compusă).</text:p>
      <text:h text:style-name="P4" text:outline-level="2"><text:span text:style-name="Strong_20_Emphasis"><text:span text:style-name="T1">De ce NU este în FN3?</text:span></text:span></text:h>
      <text:p text:style-name="P8">Avem dependență tranzitivă:</text:p>
      <text:p text:style-name="P8">dive_id → route_id → (distance_km, base_price)</text:p>
      <text:p text:style-name="P12"><text:span text:style-name="T1">→ </text:span><text:span text:style-name="Strong_20_Emphasis"><text:span text:style-name="T1">Încălcare FN3</text:span></text:span></text:p>
      <text:h text:style-name="P4" text:outline-level="2"><text:soft-page-break/><text:span text:style-name="Strong_20_Emphasis"><text:span text:style-name="T1">Descompunere în FN3</text:span></text:span></text:h>
      <text:p text:style-name="P5"><text:span text:style-name="Strong_20_Emphasis"><text:span text:style-name="T1">ROUTE(route_id, type_id, origin_station_id, destination_station_id, distance_km, base_price)</text:span></text:span><text:span text:style-name="T1"> — FN3 </text:span><text:span text:style-name="Strong_20_Emphasis"><text:span text:style-name="T1">SCHEDULED_DIVE(dive_id, route_id, departure_time, arrival_time, available_seats, pressure_level)</text:span></text:span><text:span text:style-name="T1"> — FN3</text:span></text:p>
      <text:p text:style-name="P13"><text:span text:style-name="Strong_20_Emphasis"><text:span text:style-name="T2"/></text:span></text:p>
      <text:p text:style-name="P2"/>
      <text:p text:style-name="P2"/>
      <text:h text:style-name="Heading_20_1" text:outline-level="1"><text:span text:style-name="Strong_20_Emphasis"><text:span text:style-name="T1">d. Când este utilă de‑normalizarea</text:span></text:span></text:h>
      <text:p text:style-name="P8">De‑normalizarea devine utilă în situațiile în care modelul complet normalizat (FN3) produce prea multe JOIN‑uri costisitoare sau când anumite informații sunt accesate foarte frecvent. În contextul aplicației pentru transport subacvatic cu submarine comerciale, de‑normalizarea ar fi justificată în următoarele cazuri:</text:p>
      <text:h text:style-name="Heading_20_3" text:outline-level="3"><text:span text:style-name="Strong_20_Emphasis"><text:span text:style-name="T1">1. Rapoarte frecvente despre curse (Scheduled_Dive)</text:span></text:span></text:h>
      <text:p text:style-name="P8">Interogările care afișează:</text:p>
      <text:list text:style-name="L4">
        <text:list-item>
          <text:p text:style-name="P14">distanța rutei,</text:p>
        </text:list-item>
        <text:list-item>
          <text:p text:style-name="P14">prețul de bază,</text:p>
        </text:list-item>
        <text:list-item>
          <text:p text:style-name="P14">tipul submarinului,</text:p>
        </text:list-item>
      </text:list>
      <text:p text:style-name="P2"><text:span text:style-name="T1">necesită JOIN între </text:span><text:span text:style-name="Strong_20_Emphasis"><text:span text:style-name="T1">Scheduled_Dive → Route → Submarine_Type</text:span></text:span><text:span text:style-name="T1">. Dacă aceste rapoarte sunt rulate foarte des, ar fi utilă stocarea directă în Scheduled_Dive a unor valori derivate precum:</text:span></text:p>
      <text:list text:style-name="L5">
        <text:list-item>
          <text:p text:style-name="P15"><text:span text:style-name="Source_20_Text"><text:span text:style-name="T1">distance_km</text:span></text:span></text:p>
        </text:list-item>
        <text:list-item>
          <text:p text:style-name="P15"><text:span text:style-name="Source_20_Text"><text:span text:style-name="T1">base_price</text:span></text:span></text:p>
        </text:list-item>
        <text:list-item>
          <text:p text:style-name="P15"><text:span text:style-name="Source_20_Text"><text:span text:style-name="T1">submarine_name</text:span></text:span></text:p>
        </text:list-item>
      </text:list>
      <text:p text:style-name="P8">→ Se reduce numărul de JOIN‑uri și timpul de execuție.</text:p>
      <text:h text:style-name="Heading_20_3" text:outline-level="3"><text:span text:style-name="Strong_20_Emphasis"><text:span text:style-name="T1">2. Calcularea prețului total al unui itinerariu</text:span></text:span></text:h>
      <text:p text:style-name="P8">Itinerary total_price depinde de:</text:p>
      <text:list text:style-name="L6">
        <text:list-item>
          <text:p text:style-name="P16">distanța fiecărui segment,</text:p>
        </text:list-item>
        <text:list-item>
          <text:p text:style-name="P16">prețul rutei,</text:p>
        </text:list-item>
        <text:list-item>
          <text:p text:style-name="P16">numărul de segmente.</text:p>
        </text:list-item>
      </text:list>
      <text:p text:style-name="P2"><text:span text:style-name="T1">Dacă aplicația calculează frecvent prețul total, este util să fie </text:span><text:span text:style-name="Strong_20_Emphasis"><text:span text:style-name="T1">precalculat și stocat</text:span></text:span><text:span text:style-name="T1"> în Itinerary, nu recalculat la fiecare interogare.</text:span></text:p>
      <text:p text:style-name="P8">→ De‑normalizare prin caching de valori derivate.</text:p>
      <text:h text:style-name="Heading_20_3" text:outline-level="3"><text:span text:style-name="Strong_20_Emphasis"><text:span text:style-name="T1">3. Statistici despre pasageri</text:span></text:span></text:h>
      <text:p text:style-name="P8">Interogări precum:</text:p>
      <text:list text:style-name="L7">
        <text:list-item>
          <text:p text:style-name="P17"><text:soft-page-break/>„numărul total de scufundări ale unui pasager”</text:p>
        </text:list-item>
        <text:list-item>
          <text:p text:style-name="P17">„numărul total de ore petrecute sub apă”</text:p>
        </text:list-item>
        <text:list-item>
          <text:p text:style-name="P17">„numărul de internship‑uri finalizate”</text:p>
        </text:list-item>
      </text:list>
      <text:p text:style-name="P8">implică JOIN‑uri multiple între Passenger, Itinerary, Itinerary_Segment și Scheduled_Dive.</text:p>
      <text:p text:style-name="P8">→ Se pot stoca valori agregate în Passenger (ex.: total_dives, total_hours).</text:p>
      <text:h text:style-name="Heading_20_3" text:outline-level="3"><text:span text:style-name="Strong_20_Emphasis"><text:span text:style-name="T1">4. Statistici despre echipaj</text:span></text:span></text:h>
      <text:p text:style-name="P8">Pentru rapoarte frecvente despre activitatea echipajului (Crew_Member), cum ar fi:</text:p>
      <text:list text:style-name="L8">
        <text:list-item>
          <text:p text:style-name="P18">număr de scufundări la care a participat,</text:p>
        </text:list-item>
        <text:list-item>
          <text:p text:style-name="P18">roluri îndeplinite (duty),</text:p>
        </text:list-item>
        <text:list-item>
          <text:p text:style-name="P18">feedback mediu din internship‑uri,</text:p>
        </text:list-item>
      </text:list>
      <text:p text:style-name="P8">de‑normalizarea ar reduce JOIN‑urile între Crew_Member, Dive_Crew și Internship.</text:p>
      <text:h text:style-name="Heading_20_3" text:outline-level="3"><text:span text:style-name="Strong_20_Emphasis"><text:span text:style-name="T1">5. Optimizarea performanței în aplicații cu volum mare de citiri</text:span></text:span></text:h>
      <text:p text:style-name="P8">Dacă aplicația este orientată spre:</text:p>
      <text:list text:style-name="L9">
        <text:list-item>
          <text:p text:style-name="P19">afișarea rapidă a rutelor,</text:p>
        </text:list-item>
        <text:list-item>
          <text:p text:style-name="P19">căutarea scufundărilor disponibile,</text:p>
        </text:list-item>
        <text:list-item>
          <text:p text:style-name="P19">afișarea itinerariilor pasagerilor,</text:p>
        </text:list-item>
      </text:list>
      <text:p text:style-name="P8">atunci anumite câmpuri pot fi replicate în tabelele principale pentru a evita JOIN‑uri costisitoare.</text:p>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2T23:27:59.932594000</meta:creation-date>
    <dc:date>2026-05-24T13:45:42.501838400</dc:date>
    <meta:editing-duration>PT59M35S</meta:editing-duration>
    <meta:editing-cycles>3</meta:editing-cycles>
    <meta:generator>LibreOffice/25.8.6.2$Windows_X86_64 LibreOffice_project/b4b39682cd9868fa725bc664aff94278d315bd04</meta:generator>
    <meta:document-statistic meta:table-count="0" meta:image-count="0" meta:object-count="0" meta:page-count="4" meta:paragraph-count="95" meta:word-count="629" meta:character-count="4729" meta:non-whitespace-character-count="4209"/>
  </office:meta>
</office:document-meta>
</file>