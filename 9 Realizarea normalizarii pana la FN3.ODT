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2pt" fo:font-weight="bold" officeooo:rsid="00169910" officeooo:paragraph-rsid="00169910" style:font-size-asian="22pt" style:font-weight-asian="bold" style:font-size-complex="22pt" style:font-weight-complex="bold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officeooo:rsid="001699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rmalizare</text:p>
      <text:p text:style-name="P2"/>
      <text:p text:style-name="P2"><text:span text:style-name="T1"><text:tab/></text:span>În procesul de verificare a normalizării modelului relațional, am observat că relația <text:span text:style-name="Strong_20_Emphasis">Route</text:span> necesita o delimitare mai strictă între informațiile despre traseu și cele despre stații, astfel încât atribute precum regiunea sau adâncimea să rămână în relația <text:span text:style-name="Emphasis">Station</text:span>, iar <text:span text:style-name="Emphasis">Route</text:span> să păstreze doar atribute care depind direct de cheia primară <text:span text:style-name="Emphasis">route_id</text:span>, menținând astfel forma normală 3.</text:p>
      <text:p text:style-name="P2"><text:span text:style-name="T1"><text:tab/></text:span>De asemenea, în relația <text:span text:style-name="Strong_20_Emphasis">Itinerary</text:span>, a fost necesară separarea clară a informațiilor despre pasageri, pentru a evita ca date precum numele sau adresa să fie duplicate în itinerarii; aceste atribute au fost păstrate exclusiv în <text:span text:style-name="Emphasis">Passenger</text:span>, iar <text:span text:style-name="Emphasis">Itinerary</text:span> a rămas o relație în care toate atributele depind direct de <text:span text:style-name="Emphasis">itinerary_id</text:span>.</text:p>
      <text:p text:style-name="P2"><text:span text:style-name="T1"><text:tab/></text:span>În plus, relația <text:span text:style-name="Strong_20_Emphasis">Scheduled_Dive</text:span> a fost ajustată pentru a evita dependențele tranzitive între caracteristicile rutei și programările individuale, păstrând detaliile despre traseu în <text:span text:style-name="Emphasis">Route</text:span> și limitând <text:span text:style-name="Emphasis">Scheduled_Dive</text:span> la informațiile specifice fiecărei scufundări, ceea ce asigură consistența și respectarea cerințelor FN3 în întregul model.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2T23:27:59.932594000</meta:creation-date>
    <dc:date>2026-05-12T23:33:07.515813800</dc:date>
    <meta:editing-duration>PT5M7S</meta:editing-duration>
    <meta:editing-cycles>1</meta:editing-cycles>
    <meta:document-statistic meta:table-count="0" meta:image-count="0" meta:object-count="0" meta:page-count="1" meta:paragraph-count="4" meta:word-count="150" meta:character-count="1053" meta:non-whitespace-character-count="904"/>
    <meta:generator>LibreOffice/25.8.5.2$Windows_X86_64 LibreOffice_project/9c8b85f387cc00a89945a79c9e6239f32e450ac2</meta:generator>
  </office:meta>
</office:document-meta>
</file>