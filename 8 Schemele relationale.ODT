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2pt" fo:font-weight="bold" officeooo:rsid="0011f36e" officeooo:paragraph-rsid="0011f36e" style:font-size-asian="22pt" style:font-weight-asian="bold" style:font-size-complex="22pt" style:font-weight-complex="bold"/>
    </style:style>
    <style:style style:name="T1" style:family="text">
      <style:text-properties officeooo:rsid="00138c0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chemele relationale</text:p>
      <text:p text:style-name="Standard"/>
      <text:p text:style-name="Standard">Submarine_Type(</text:p>
      <text:p text:style-name="Standard"><text:s text:c="4"/>type_id PRIMARY KEY,</text:p>
      <text:p text:style-name="Standard"><text:s text:c="4"/>name,</text:p>
      <text:p text:style-name="Standard"><text:s text:c="4"/>max_depth_meters,</text:p>
      <text:p text:style-name="Standard"><text:s text:c="4"/>capacity</text:p>
      <text:p text:style-name="Standard">)</text:p>
      <text:p text:style-name="Standard"/>
      <text:p text:style-name="Standard">Station(</text:p>
      <text:p text:style-name="Standard"><text:s text:c="4"/>station_id PRIMARY KEY,</text:p>
      <text:p text:style-name="Standard"><text:s text:c="4"/>name,</text:p>
      <text:p text:style-name="Standard"><text:s text:c="4"/>region,</text:p>
      <text:p text:style-name="Standard"><text:s text:c="4"/>depth_meters</text:p>
      <text:p text:style-name="Standard">)</text:p>
      <text:p text:style-name="Standard"/>
      <text:p text:style-name="Standard">Route(</text:p>
      <text:p text:style-name="Standard"><text:s text:c="4"/>route_id PRIMARY KEY,</text:p>
      <text:p text:style-name="Standard"><text:s text:c="4"/>type_id REFERENCES Submarine_Type(type_id),</text:p>
      <text:p text:style-name="Standard"><text:s text:c="4"/>origin_station_id REFERENCES Station(station_id),</text:p>
      <text:p text:style-name="Standard"><text:s text:c="4"/>destination_station_id REFERENCES Station(station_id),</text:p>
      <text:p text:style-name="Standard"><text:s text:c="4"/>distance_km,</text:p>
      <text:p text:style-name="Standard"><text:s text:c="4"/>base_price</text:p>
      <text:p text:style-name="Standard">)</text:p>
      <text:p text:style-name="Standard"/>
      <text:p text:style-name="Standard">Scheduled_Dive(</text:p>
      <text:p text:style-name="Standard"><text:s text:c="4"/>dive_id PRIMARY KEY,</text:p>
      <text:p text:style-name="Standard"><text:s text:c="4"/>route_id REFERENCES Route(route_id),</text:p>
      <text:p text:style-name="Standard"><text:s text:c="4"/>departure_time,</text:p>
      <text:p text:style-name="Standard"><text:s text:c="4"/>arrival_time,</text:p>
      <text:p text:style-name="Standard"><text:s text:c="4"/>available_seats,</text:p>
      <text:p text:style-name="Standard"><text:s text:c="4"/>pressure_level</text:p>
      <text:p text:style-name="Standard">)</text:p>
      <text:p text:style-name="Standard"/>
      <text:p text:style-name="Standard">Passenger(</text:p>
      <text:p text:style-name="Standard"><text:s text:c="4"/>passenger_id PRIMARY KEY,</text:p>
      <text:p text:style-name="Standard"><text:s text:c="4"/>first_name,</text:p>
      <text:p text:style-name="Standard"><text:s text:c="4"/>last_name,</text:p>
      <text:p text:style-name="Standard"><text:s text:c="4"/>email,</text:p>
      <text:p text:style-name="Standard"><text:s text:c="4"/>medical_clearance</text:p>
      <text:p text:style-name="Standard">)</text:p>
      <text:p text:style-name="Standard"/>
      <text:p text:style-name="Standard">Itinerary(</text:p>
      <text:p text:style-name="Standard"><text:s text:c="4"/>itinerary_id PRIMARY KEY,</text:p>
      <text:p text:style-name="Standard"><text:s text:c="4"/>passenger_id REFERENCES Passenger(passenger_id),</text:p>
      <text:p text:style-name="Standard"><text:s text:c="4"/>created_at,</text:p>
      <text:p text:style-name="Standard"><text:s text:c="4"/>total_price</text:p>
      <text:p text:style-name="Standard">)</text:p>
      <text:p text:style-name="Standard"><text:soft-page-break/></text:p>
      <text:p text:style-name="Standard">Itinerary_Segment(</text:p>
      <text:p text:style-name="Standard"><text:s text:c="4"/>segment_id PRIMARY KEY,</text:p>
      <text:p text:style-name="Standard"><text:s text:c="4"/>itinerary_id REFERENCES Itinerary(itinerary_id),</text:p>
      <text:p text:style-name="Standard"><text:s text:c="4"/>dive_id REFERENCES Scheduled_Dive(dive_id),</text:p>
      <text:p text:style-name="Standard"><text:s text:c="4"/>segment_order,</text:p>
      <text:p text:style-name="Standard"><text:s text:c="4"/>seat_number</text:p>
      <text:p text:style-name="Standard">)</text:p>
      <text:p text:style-name="Standard"/>
      <text:p text:style-name="Standard">Crew_Member(</text:p>
      <text:p text:style-name="Standard"><text:s text:c="4"/>crew_id PRIMARY KEY,</text:p>
      <text:p text:style-name="Standard"><text:s text:c="4"/>first_name,</text:p>
      <text:p text:style-name="Standard"><text:s text:c="4"/>last_name,</text:p>
      <text:p text:style-name="Standard"><text:s text:c="4"/>certification_level,</text:p>
      <text:p text:style-name="Standard"><text:s text:c="4"/>experience_years</text:p>
      <text:p text:style-name="Standard">)</text:p>
      <text:p text:style-name="Standard"/>
      <text:p text:style-name="Standard">Dive_Crew(</text:p>
      <text:p text:style-name="Standard"><text:s text:c="4"/>dive_id REFERENCES Scheduled_Dive(dive_id),</text:p>
      <text:p text:style-name="Standard"><text:s text:c="4"/>crew_id REFERENCES Crew_Member(crew_id),</text:p>
      <text:p text:style-name="Standard"><text:s text:c="4"/>duty,</text:p>
      <text:p text:style-name="Standard"><text:s text:c="4"/>PRIMARY KEY(dive_id, crew_id)</text:p>
      <text:p text:style-name="Standard">)</text:p>
      <text:p text:style-name="Standard"/>
      <text:p text:style-name="Standard">Internship(</text:p>
      <text:p text:style-name="Standard"><text:s text:c="4"/>passenger_id REFERENCES Passenger(passenger_id),</text:p>
      <text:p text:style-name="Standard"><text:s text:c="4"/>crew_id REFERENCES Crew_Member(crew_id),</text:p>
      <text:p text:style-name="Standard"><text:s text:c="4"/>dive_id<text:span text:style-name="T1"> </text:span>REFERENCES Scheduled_Dive(dive_id),</text:p>
      <text:p text:style-name="Standard"><text:s text:c="4"/>training_level,</text:p>
      <text:p text:style-name="Standard"><text:s text:c="4"/>feedback,</text:p>
      <text:p text:style-name="Standard"><text:s text:c="4"/>PRIMARY KEY(passenger_id, crew_id, dive_id)</text:p>
      <text:p text:style-name="Standard">)</text:p>
      <text:p text:style-name="Standard"/>
      <text:p text:style-name="Standard">Captain(</text:p>
      <text:p text:style-name="Standard"><text:s text:c="4"/>crew_id PRIMARY KEY REFERENCES Crew_Member(crew_id),</text:p>
      <text:p text:style-name="Standard"><text:s text:c="4"/>command_level</text:p>
      <text:p text:style-name="Standard">)</text:p>
      <text:p text:style-name="Standard"/>
      <text:p text:style-name="Standard">Engineer(</text:p>
      <text:p text:style-name="Standard"><text:s text:c="4"/>crew_id PRIMARY KEY REFERENCES Crew_Member(crew_id),</text:p>
      <text:p text:style-name="Standard"><text:s text:c="4"/>specialty</text:p>
      <text:p text:style-name="Standard">)</text:p>
      <text:p text:style-name="Standard"/>
      <text:p text:style-name="Standard">Medic(</text:p>
      <text:p text:style-name="Standard"><text:s text:c="4"/>crew_id PRIMARY KEY REFERENCES Crew_Member(crew_id),</text:p>
      <text:p text:style-name="Standard"><text:s text:c="4"/>medical_specialization ,</text:p>
      <text:p text:style-name="Standard"><text:s text:c="4"/>emergency_training_level</text:p>
      <text:p text:style-name="Standard">)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5-12T23:23:15.962804000</meta:creation-date>
    <dc:date>2026-05-13T12:31:16.104499300</dc:date>
    <meta:editing-duration>PT5M8S</meta:editing-duration>
    <meta:editing-cycles>2</meta:editing-cycles>
    <meta:generator>LibreOffice/25.8.5.2$Windows_X86_64 LibreOffice_project/9c8b85f387cc00a89945a79c9e6239f32e450ac2</meta:generator>
    <meta:document-statistic meta:table-count="0" meta:image-count="0" meta:object-count="0" meta:page-count="2" meta:paragraph-count="83" meta:word-count="142" meta:character-count="1716" meta:non-whitespace-character-count="1433"/>
  </office:meta>
</office:document-meta>
</file>