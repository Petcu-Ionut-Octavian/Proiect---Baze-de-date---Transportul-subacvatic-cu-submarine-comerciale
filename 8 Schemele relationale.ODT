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1f36e" officeooo:paragraph-rsid="0011f36e" style:font-size-asian="22pt" style:font-weight-asian="bold" style:font-size-complex="2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emele relationale</text:p>
      <text:p text:style-name="Standard"/>
      <text:p text:style-name="Standard">Submarine_Type(</text:p>
      <text:p text:style-name="Standard"><text:s text:c="4"/>type_id INT PRIMARY KEY,</text:p>
      <text:p text:style-name="Standard"><text:s text:c="4"/>name VARCHAR(100),</text:p>
      <text:p text:style-name="Standard"><text:s text:c="4"/>max_depth_meters INT,</text:p>
      <text:p text:style-name="Standard"><text:s text:c="4"/>capacity INT</text:p>
      <text:p text:style-name="Standard">)</text:p>
      <text:p text:style-name="Standard"/>
      <text:p text:style-name="Standard">Station(</text:p>
      <text:p text:style-name="Standard"><text:s text:c="4"/>station_id INT PRIMARY KEY,</text:p>
      <text:p text:style-name="Standard"><text:s text:c="4"/>name VARCHAR(100),</text:p>
      <text:p text:style-name="Standard"><text:s text:c="4"/>region VARCHAR(100),</text:p>
      <text:p text:style-name="Standard"><text:s text:c="4"/>depth_meters INT</text:p>
      <text:p text:style-name="Standard">)</text:p>
      <text:p text:style-name="Standard"/>
      <text:p text:style-name="Standard">Route(</text:p>
      <text:p text:style-name="Standard"><text:s text:c="4"/>route_id INT PRIMARY KEY,</text:p>
      <text:p text:style-name="Standard"><text:s text:c="4"/>type_id INT REFERENCES Submarine_Type(type_id),</text:p>
      <text:p text:style-name="Standard"><text:s text:c="4"/>origin_station_id INT REFERENCES Station(station_id),</text:p>
      <text:p text:style-name="Standard"><text:s text:c="4"/>destination_station_id INT REFERENCES Station(station_id),</text:p>
      <text:p text:style-name="Standard"><text:s text:c="4"/>distance_km DECIMAL,</text:p>
      <text:p text:style-name="Standard"><text:s text:c="4"/>base_price DECIMAL</text:p>
      <text:p text:style-name="Standard">)</text:p>
      <text:p text:style-name="Standard"/>
      <text:p text:style-name="Standard">Scheduled_Dive(</text:p>
      <text:p text:style-name="Standard"><text:s text:c="4"/>dive_id INT PRIMARY KEY,</text:p>
      <text:p text:style-name="Standard"><text:s text:c="4"/>route_id INT REFERENCES Route(route_id),</text:p>
      <text:p text:style-name="Standard"><text:s text:c="4"/>departure_time DATETIME,</text:p>
      <text:p text:style-name="Standard"><text:s text:c="4"/>arrival_time DATETIME,</text:p>
      <text:p text:style-name="Standard"><text:s text:c="4"/>available_seats INT,</text:p>
      <text:p text:style-name="Standard"><text:s text:c="4"/>pressure_level INT</text:p>
      <text:p text:style-name="Standard">)</text:p>
      <text:p text:style-name="Standard"/>
      <text:p text:style-name="Standard">Passenger(</text:p>
      <text:p text:style-name="Standard"><text:s text:c="4"/>passenger_id INT PRIMARY KEY,</text:p>
      <text:p text:style-name="Standard"><text:s text:c="4"/>first_name VARCHAR(100),</text:p>
      <text:p text:style-name="Standard"><text:s text:c="4"/>last_name VARCHAR(100),</text:p>
      <text:p text:style-name="Standard"><text:s text:c="4"/>email VARCHAR(150),</text:p>
      <text:p text:style-name="Standard"><text:s text:c="4"/>medical_clearance VARCHAR(10)</text:p>
      <text:p text:style-name="Standard">)</text:p>
      <text:p text:style-name="Standard"/>
      <text:p text:style-name="Standard">Itinerary(</text:p>
      <text:p text:style-name="Standard"><text:s text:c="4"/>itinerary_id INT PRIMARY KEY,</text:p>
      <text:p text:style-name="Standard"><text:s text:c="4"/>passenger_id INT REFERENCES Passenger(passenger_id),</text:p>
      <text:p text:style-name="Standard"><text:s text:c="4"/>created_at DATETIME,</text:p>
      <text:p text:style-name="Standard"><text:s text:c="4"/>total_price DECIMAL</text:p>
      <text:p text:style-name="Standard">)</text:p>
      <text:p text:style-name="Standard"><text:soft-page-break/></text:p>
      <text:p text:style-name="Standard">Itinerary_Segment(</text:p>
      <text:p text:style-name="Standard"><text:s text:c="4"/>segment_id INT PRIMARY KEY,</text:p>
      <text:p text:style-name="Standard"><text:s text:c="4"/>itinerary_id INT REFERENCES Itinerary(itinerary_id),</text:p>
      <text:p text:style-name="Standard"><text:s text:c="4"/>dive_id INT REFERENCES Scheduled_Dive(dive_id),</text:p>
      <text:p text:style-name="Standard"><text:s text:c="4"/>segment_order INT,</text:p>
      <text:p text:style-name="Standard"><text:s text:c="4"/>seat_number VARCHAR(10)</text:p>
      <text:p text:style-name="Standard">)</text:p>
      <text:p text:style-name="Standard"/>
      <text:p text:style-name="Standard">Crew_Member(</text:p>
      <text:p text:style-name="Standard"><text:s text:c="4"/>crew_id INT PRIMARY KEY,</text:p>
      <text:p text:style-name="Standard"><text:s text:c="4"/>first_name VARCHAR(100),</text:p>
      <text:p text:style-name="Standard"><text:s text:c="4"/>last_name VARCHAR(100),</text:p>
      <text:p text:style-name="Standard"><text:s text:c="4"/>certification_level VARCHAR(100),</text:p>
      <text:p text:style-name="Standard"><text:s text:c="4"/>experience_years INT</text:p>
      <text:p text:style-name="Standard">)</text:p>
      <text:p text:style-name="Standard"/>
      <text:p text:style-name="Standard">Dive_Crew(</text:p>
      <text:p text:style-name="Standard"><text:s text:c="4"/>dive_id INT REFERENCES Scheduled_Dive(dive_id),</text:p>
      <text:p text:style-name="Standard"><text:s text:c="4"/>crew_id INT REFERENCES Crew_Member(crew_id),</text:p>
      <text:p text:style-name="Standard"><text:s text:c="4"/>duty VARCHAR(100),</text:p>
      <text:p text:style-name="Standard"><text:s text:c="4"/>PRIMARY KEY(dive_id, crew_id)</text:p>
      <text:p text:style-name="Standard">)</text:p>
      <text:p text:style-name="Standard"/>
      <text:p text:style-name="Standard">Internship(</text:p>
      <text:p text:style-name="Standard"><text:s text:c="4"/>passenger_id INT REFERENCES Passenger(passenger_id),</text:p>
      <text:p text:style-name="Standard"><text:s text:c="4"/>crew_id INT REFERENCES Crew_Member(crew_id),</text:p>
      <text:p text:style-name="Standard"><text:s text:c="4"/>dive_id INT REFERENCES Scheduled_Dive(dive_id),</text:p>
      <text:p text:style-name="Standard"><text:s text:c="4"/>training_level VARCHAR(100),</text:p>
      <text:p text:style-name="Standard"><text:s text:c="4"/>feedback INT,</text:p>
      <text:p text:style-name="Standard"><text:s text:c="4"/>PRIMARY KEY(passenger_id, crew_id, dive_id)</text:p>
      <text:p text:style-name="Standard">)</text:p>
      <text:p text:style-name="Standard"/>
      <text:p text:style-name="Standard">Captain(</text:p>
      <text:p text:style-name="Standard"><text:s text:c="4"/>crew_id INT PRIMARY KEY REFERENCES Crew_Member(crew_id),</text:p>
      <text:p text:style-name="Standard"><text:s text:c="4"/>command_level VARCHAR(50)</text:p>
      <text:p text:style-name="Standard">)</text:p>
      <text:p text:style-name="Standard"/>
      <text:p text:style-name="Standard">Engineer(</text:p>
      <text:p text:style-name="Standard"><text:s text:c="4"/>crew_id INT PRIMARY KEY REFERENCES Crew_Member(crew_id),</text:p>
      <text:p text:style-name="Standard"><text:s text:c="4"/>specialty VARCHAR(100)</text:p>
      <text:p text:style-name="Standard">)</text:p>
      <text:p text:style-name="Standard"/>
      <text:p text:style-name="Standard">Medic(</text:p>
      <text:p text:style-name="Standard"><text:s text:c="4"/>crew_id INT PRIMARY KEY REFERENCES Crew_Member(crew_id),</text:p>
      <text:p text:style-name="Standard"><text:s text:c="4"/>medical_specialization VARCHAR(100),</text:p>
      <text:p text:style-name="Standard"><text:s text:c="4"/>emergency_training_level VARCHAR(50)</text:p>
      <text:p text:style-name="Standard"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2T23:23:15.962804000</meta:creation-date>
    <dc:date>2026-05-12T23:24:37.626162500</dc:date>
    <meta:editing-duration>PT1M22S</meta:editing-duration>
    <meta:editing-cycles>1</meta:editing-cycles>
    <meta:document-statistic meta:table-count="0" meta:image-count="0" meta:object-count="0" meta:page-count="2" meta:paragraph-count="83" meta:word-count="195" meta:character-count="2107" meta:non-whitespace-character-count="1771"/>
    <meta:generator>LibreOffice/25.8.5.2$Windows_X86_64 LibreOffice_project/9c8b85f387cc00a89945a79c9e6239f32e450ac2</meta:generator>
  </office:meta>
</office:document-meta>
</file>